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margin-top="0in" fo:margin-bottom="0.139in" style:contextual-spacing="false" fo:text-align="center" style:justify-single-word="false"/>
    </style:style>
    <style:style style:name="P2" style:family="paragraph" style:parent-style-name="Heading_20_2">
      <style:paragraph-properties fo:margin-top="0in" fo:margin-bottom="0.139in" style:contextual-spacing="false" fo:text-align="left" style:justify-single-word="false"/>
    </style:style>
    <style:style style:name="P3" style:family="paragraph" style:parent-style-name="Standard">
      <style:paragraph-properties fo:margin-top="0in" fo:margin-bottom="0.0835in" style:contextual-spacing="false" fo:text-align="left" style:justify-single-word="false"/>
    </style:style>
    <style:style style:name="P4" style:family="paragraph" style:parent-style-name="Standard">
      <style:paragraph-properties fo:margin-top="0in" fo:margin-bottom="0.139in" style:contextual-spacing="false"/>
    </style:style>
    <style:style style:name="P5" style:family="paragraph" style:parent-style-name="Standard">
      <style:paragraph-properties fo:margin-top="0in" fo:margin-bottom="0.0835in" style:contextual-spacing="false" fo:padding-left="0in" fo:padding-right="0in" fo:padding-top="0in" fo:padding-bottom="0.0138in" fo:border-left="none" fo:border-right="none" fo:border-top="none" fo:border-bottom="0.74pt solid #000000"/>
    </style:style>
    <style:style style:name="P6" style:family="paragraph" style:parent-style-name="Standard">
      <style:paragraph-properties fo:margin-left="0.2083in" fo:margin-top="0in" fo:margin-bottom="0.0835in" style:contextual-spacing="false" fo:text-align="left" style:justify-single-word="false" fo:padding-left="2.778in" fo:padding-right="0in" fo:padding-top="0in" fo:padding-bottom="0in" fo:border-left="1.5pt solid #bfbfbf" fo:border-right="none" fo:border-top="none" fo:border-bottom="none"/>
    </style:style>
    <style:style style:name="P7" style:family="paragraph" style:parent-style-name="List_20_Paragraph" style:list-style-name="WWNum2">
      <style:paragraph-properties fo:margin-top="0in" fo:margin-bottom="0.0693in" style:contextual-spacing="false" fo:text-align="left" style:justify-single-word="false"/>
    </style:style>
    <style:style style:name="P8" style:family="paragraph" style:parent-style-name="List_20_Paragraph" style:list-style-name="WWNum2">
      <style:paragraph-properties fo:margin-left="0.3752in" fo:margin-top="0in" fo:margin-bottom="0.0693in" style:contextual-spacing="false" fo:text-align="left" style:justify-single-word="false" fo:text-indent="-0.1252in" style:auto-text-indent="false" fo:padding-left="2.778in" fo:padding-right="0in" fo:padding-top="0in" fo:padding-bottom="0in" fo:border-left="1.5pt solid #bfbfbf" fo:border-right="none" fo:border-top="none" fo:border-bottom="none"/>
    </style:style>
    <style:style style:name="P9" style:family="paragraph" style:parent-style-name="Heading_20_3">
      <style:paragraph-properties fo:margin-top="0in" fo:margin-bottom="0.139in" style:contextual-spacing="false" fo:text-align="lef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family="'Courier New'" style:font-family-generic="roman" style:font-pitch="variable" fo:background-color="#f1f5f9" loext:char-shading-value="0" style:font-family-asian="'Courier New'" style:font-family-generic-asian="system" style:font-pitch-asian="variable" style:font-family-complex="'Courier New'" style:font-family-generic-complex="system" style:font-pitch-complex="variab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as Code</text:p>
      <text:p text:style-name="P2">Why AI Has Made the Most Underrated Part of Engineering the Most Important One</text:p>
      <text:p text:style-name="P3"><text:span text:style-name="T1">By Sean Wong</text:span></text:p>
      <text:p text:style-name="P4"><text:s/></text:p>
      <text:p text:style-name="P5"/>
      <text:p text:style-name="P4"><text:s/></text:p>
      <text:p text:style-name="P3">There is a phrase that has echoed through software teams for so long it has become invisible:</text:p>
      <text:p text:style-name="P4"><text:s/></text:p>
      <text:p text:style-name="P6">"Agile killed documentation."</text:p>
      <text:p text:style-name="P4"><text:s/></text:p>
      <text:p text:style-name="P3">It is a comfortable line. It sounds like wisdom. It is repeated so often that many engineers stop questioning it. But the truth is more interesting, and more important.</text:p>
      <text:p text:style-name="P4"><text:s/></text:p>
      <text:p text:style-name="P3">Agile did not kill documentation. Agile killed documentation that nobody used.</text:p>
      <text:p text:style-name="P4"><text:s/></text:p>
      <text:p text:style-name="P5"/>
      <text:p text:style-name="P4"><text:s/></text:p>
      <text:p text:style-name="P2">The Great Misunderstanding</text:p>
      <text:p text:style-name="P3">The Agile Manifesto famously says we value:</text:p>
      <text:p text:style-name="P4"><text:s/></text:p>
      <text:p text:style-name="P6">"Working software over comprehensive documentation."</text:p>
      <text:p text:style-name="P4"><text:s/></text:p>
      <text:p text:style-name="P3">Notice what it does <text:span text:style-name="T2">not</text:span> say. It does not say "working software instead of documentation." It does not say "no documentation." It does not say "documentation is worthless."</text:p>
      <text:p text:style-name="P4"><text:s/></text:p>
      <text:p text:style-name="P3">It says <text:span text:style-name="T2">over</text:span>.</text:p>
      <text:p text:style-name="P4"><text:s/></text:p>
      <text:p text:style-name="P3">That word matters. In 2001, this was a necessary correction. Teams were drowning in hundreds of pages of requirements, architectural diagrams, and process artifacts. Documentation had become the deliverable. Software was secondary. Updates were rare. By the time development started, the documents were already out of date.</text:p>
      <text:p text:style-name="P4"><text:soft-page-break/><text:s/></text:p>
      <text:p text:style-name="P3">Agile was never anti-documentation. It was anti-waste.</text:p>
      <text:p text:style-name="P4"><text:s/></text:p>
      <text:p text:style-name="P6">Keep the documentation that creates value.<text:line-break/>Eliminate the documentation that does not.</text:p>
      <text:p text:style-name="P4"><text:s/></text:p>
      <text:p text:style-name="P3">For more than two decades, that interpretation worked remarkably well. Teams wrote less, shipped faster, and treated documentation as a conversation instead of a contract.</text:p>
      <text:p text:style-name="P4"><text:s/></text:p>
      <text:p text:style-name="P3">Then AI arrived.</text:p>
      <text:p text:style-name="P4"><text:s/></text:p>
      <text:p text:style-name="P3">And suddenly, documentation became one of the most valuable engineering assets in the stack again.</text:p>
      <text:p text:style-name="P4"><text:s/></text:p>
      <text:p text:style-name="P5"/>
      <text:p text:style-name="P4"><text:s/></text:p>
      <text:p text:style-name="P2">The Real Shift: Documentation Has a New Audience</text:p>
      <text:p text:style-name="P3">Historically, documentation existed for humans. Future developers, new team members, architects, auditors, support engineers. It was written so that someone six months from now could understand what happened today.</text:p>
      <text:p text:style-name="P4"><text:s/></text:p>
      <text:p text:style-name="P3">AI changes that assumption.</text:p>
      <text:p text:style-name="P4"><text:s/></text:p>
      <text:p text:style-name="P3">Today, documentation often has a new primary consumer: <text:span text:style-name="T1">large language models</text:span>.</text:p>
      <text:p text:style-name="P4"><text:s/></text:p>
      <text:p text:style-name="P3">That shift is small in wording but enormous in consequence.</text:p>
      <text:p text:style-name="P4"><text:s/></text:p>
      <text:p text:style-name="P3">Traditional documentation was written for future humans, read occasionally, updated when remembered, and lived in wikis or Confluence. It was static. Passive. A reference.</text:p>
      <text:p text:style-name="P4"><text:s/></text:p>
      <text:p text:style-name="P3">AI-native documentation is written for present-day AI. It is machine-consumable. It is read constantly. It is updated continuously. It lives in source control. It is active. It is execution context.</text:p>
      <text:p text:style-name="P4"><text:s/></text:p>
      <text:p text:style-name="P3"><text:soft-page-break/>Documentation is no longer just historical knowledge. It has become <text:span text:style-name="T1">operational knowledge</text:span>.</text:p>
      <text:p text:style-name="P4"><text:s/></text:p>
      <text:p text:style-name="P5"/>
      <text:p text:style-name="P4"><text:s/></text:p>
      <text:p text:style-name="P2">The Vibe Coding Paradox</text:p>
      <text:p text:style-name="P3">The rise of AI-assisted development—often called <text:span text:style-name="T2">vibe coding</text:span>—has created a strange paradox.</text:p>
      <text:p text:style-name="P4"><text:s/></text:p>
      <text:p text:style-name="P3">Many developers assume that AI means we need <text:span text:style-name="T2">less</text:span> documentation. The machine can figure it out. We can just prompt and go.</text:p>
      <text:p text:style-name="P4"><text:s/></text:p>
      <text:p text:style-name="P3">The opposite is true.</text:p>
      <text:p text:style-name="P4"><text:s/></text:p>
      <text:p text:style-name="P3">The fundamental limitation exposed by AI-native development is simple:</text:p>
      <text:p text:style-name="P4"><text:s/></text:p>
      <text:p text:style-name="P6">Large language models have no organizational memory.</text:p>
      <text:p text:style-name="P4"><text:s/></text:p>
      <text:p text:style-name="P3">When you pair with a human engineer, context is shared. They understand architecture decisions, team conventions, domain terminology, previous trade-offs, and historical constraints.</text:p>
      <text:p text:style-name="P4"><text:s/></text:p>
      <text:p text:style-name="P3">An LLM understands none of that. Every conversation begins with a blank slate. Every prompt starts at zero. Every missing piece of context becomes an opportunity for hallucination.</text:p>
      <text:p text:style-name="P4"><text:s/></text:p>
      <text:p text:style-name="P3">An LLM is, in many ways, an <text:span text:style-name="T1">amnesiac genius</text:span>. It can generate code at extraordinary speed. But unless you provide rich context, it will confidently build the wrong thing.</text:p>
      <text:p text:style-name="P4"><text:s/></text:p>
      <text:p text:style-name="P3">This creates what I call <text:span text:style-name="T1">the Hallucination Tax</text:span>:</text:p>
      <text:p text:style-name="P4"><text:s/></text:p>
      <text:list text:style-name="WWNum2">
        <text:list-item text:start-value="1">
          <text:p text:style-name="P7">More assumptions</text:p>
        </text:list-item>
        <text:list-item>
          <text:p text:style-name="P7">More architectural drift</text:p>
        </text:list-item>
        <text:list-item>
          <text:p text:style-name="P7">More code review overhead</text:p>
        </text:list-item>
        <text:list-item>
          <text:p text:style-name="P7">More rework</text:p>
        </text:list-item>
      </text:list>
      <text:p text:style-name="P4"><text:soft-page-break/><text:s/></text:p>
      <text:p text:style-name="P3">The problem is rarely model quality. The problem is <text:span text:style-name="T1">context quality</text:span>. And context has a familiar name: <text:span text:style-name="T1">documentation</text:span>.</text:p>
      <text:p text:style-name="P4"><text:s/></text:p>
      <text:p text:style-name="P5"/>
      <text:p text:style-name="P4"><text:s/></text:p>
      <text:p text:style-name="P2">Documentation Is Becoming Compiler Input</text:p>
      <text:p text:style-name="P3">The biggest mistake teams make is treating documentation as a human artifact. In AI-native development, documentation behaves more like source code.</text:p>
      <text:p text:style-name="P4"><text:s/></text:p>
      <text:p text:style-name="P3">Consider the difference:</text:p>
      <text:p text:style-name="P4"><text:s/></text:p>
      <text:p text:style-name="P3"><text:span text:style-name="T1">Weak prompt:</text:span> <text:s/></text:p>
      <text:p text:style-name="P6">Build a login page.</text:p>
      <text:p text:style-name="P4"><text:s/></text:p>
      <text:p text:style-name="P3"><text:span text:style-name="T1">Strong prompt:</text:span> <text:s/></text:p>
      <text:p text:style-name="P6">Read SPEC.md and .cursorrules.<text:line-break/>Build a login page.<text:line-break/>Requirements: <text:s/></text:p>
      <text:list text:continue-numbering="true" text:style-name="WWNum2">
        <text:list-item>
          <text:p text:style-name="P8">Use existing Button component</text:p>
        </text:list-item>
        <text:list-item>
          <text:p text:style-name="P8">Use Zustand store</text:p>
        </text:list-item>
        <text:list-item>
          <text:p text:style-name="P8">Follow shadcn/ui patterns<text:line-break/>Don't: <text:s/></text:p>
        </text:list-item>
        <text:list-item>
          <text:p text:style-name="P8">Modify auth logic</text:p>
        </text:list-item>
        <text:list-item>
          <text:p text:style-name="P8">Create new API endpoints</text:p>
        </text:list-item>
      </text:list>
      <text:p text:style-name="P4"><text:s/></text:p>
      <text:p text:style-name="P3">The second prompt generates dramatically better outcomes because documentation acts as <text:span text:style-name="T1">constraints</text:span>. The AI is not simply generating code—it is compiling instructions into implementation.</text:p>
      <text:p text:style-name="P4"><text:s/></text:p>
      <text:p text:style-name="P3">Documentation has effectively become <text:span text:style-name="T1">source code for AI behavior</text:span>.</text:p>
      <text:p text:style-name="P4"><text:s/></text:p>
      <text:p text:style-name="P5"/>
      <text:p text:style-name="P4"><text:s/></text:p>
      <text:p text:style-name="P2"><text:soft-page-break/>Prompt-First Documentation: Three Principles</text:p>
      <text:p text:style-name="P3">Once you accept that AI is a primary consumer of documentation, the form changes.</text:p>
      <text:p text:style-name="P4"><text:s/></text:p>
      <text:p text:style-name="P3">The objective is no longer: <text:s/></text:p>
      <text:p text:style-name="P6">"What should future developers know?"</text:p>
      <text:p text:style-name="P4"><text:s/></text:p>
      <text:p text:style-name="P3">Instead, it becomes: <text:s/></text:p>
      <text:p text:style-name="P6">"What must an AI understand before it writes code?"</text:p>
      <text:p text:style-name="P4"><text:s/></text:p>
      <text:p text:style-name="P3">This leads to three practical principles.</text:p>
      <text:p text:style-name="P4"><text:s/></text:p>
      <text:p text:style-name="P9">Principle 1: Extract, Don't Write</text:p>
      <text:p text:style-name="P3">Documentation should be generated from implementation whenever possible. After completing a feature, documentation becomes a by-product of development rather than an additional burden.</text:p>
      <text:p text:style-name="P4"><text:s/></text:p>
      <text:p text:style-name="P9">Principle 2: Types Are Better Than Prose</text:p>
      <text:p text:style-name="P3">The most powerful specification is not English. It is structure. A single type definition communicates allowed values, constraints, relationships, and boundaries more effectively than multiple paragraphs of prose. Humans understand it, compilers understand it, LLMs understand it. This is <text:span text:style-name="T1">executable documentation</text:span>.</text:p>
      <text:p text:style-name="P4"><text:s/></text:p>
      <text:p text:style-name="P9">Principle 3: Scope Ruthlessly</text:p>
      <text:p text:style-name="P3">Ambiguity creates complexity. Every AI task should contain explicit boundaries. A strong <text:span text:style-name="T1">DON'T</text:span> section often eliminates entire categories of mistakes. The best prompts are often defined as much by what they prohibit as what they request.</text:p>
      <text:p text:style-name="P4"><text:s/></text:p>
      <text:p text:style-name="P5"/>
      <text:p text:style-name="P4"><text:s/></text:p>
      <text:p text:style-name="P2">The Three-Layer Specification Model</text:p>
      <text:p text:style-name="P3">Successful AI-assisted teams naturally converge on three distinct specification layers.</text:p>
      <text:p text:style-name="P4"><text:s/></text:p>
      <text:p text:style-name="P3"><text:soft-page-break/>Think of it as onboarding an exceptionally talented engineer who suffers complete memory loss between conversations.</text:p>
      <text:p text:style-name="P4"><text:s/></text:p>
      <text:p text:style-name="P9">Layer 1: Application Spec — What Are We Building?</text:p>
      <text:p text:style-name="P3">The product truth. Contains business goals, domain models, user workflows, business rules, and explicit non-goals. Purpose: <text:span text:style-name="T1">Prevent the AI from inventing features.</text:span></text:p>
      <text:p text:style-name="P4"><text:s/></text:p>
      <text:p text:style-name="P9">Layer 2: Architecture Spec — How Should It Be Built?</text:p>
      <text:p text:style-name="P3">Engineering standards, typically stored in <text:span text:style-name="T3">.cursorrules</text:span>, <text:span text:style-name="T3">CLAUDE.md</text:span>, <text:span text:style-name="T3">AGENTS.md</text:span>, or <text:span text:style-name="T3">PROJECT_CONTEXT.md</text:span>. Purpose: <text:span text:style-name="T1">Prevent architectural drift.</text:span></text:p>
      <text:p text:style-name="P4"><text:s/></text:p>
      <text:p text:style-name="P9">Layer 3: Task Spec — What Needs To Be Built Right Now?</text:p>
      <text:p text:style-name="P3">The implementation request. Combines Application context + Architecture constraints + immediate objective.</text:p>
      <text:p text:style-name="P4"><text:s/></text:p>
      <text:p text:style-name="P5"/>
      <text:p text:style-name="P4"><text:s/></text:p>
      <text:p text:style-name="P2">Documentation as a Learning System</text:p>
      <text:p text:style-name="P3">The most powerful aspect is that documentation becomes <text:span text:style-name="T1">self-improving</text:span>.</text:p>
      <text:p text:style-name="P4"><text:s/></text:p>
      <text:p text:style-name="P3">When the AI violates a pattern, don't just fix the code—update the specification. The next prompt improves. And the next. Documentation evolves into a living system that continuously trains your AI collaborator.</text:p>
      <text:p text:style-name="P4"><text:s/></text:p>
      <text:p text:style-name="P5"/>
      <text:p text:style-name="P4"><text:s/></text:p>
      <text:p text:style-name="P2">Documentation Is Becoming a Programming Language</text:p>
      <text:p text:style-name="P3">The bottleneck in software development has moved. For decades it was coding speed. Today it is <text:span text:style-name="T1">context quality</text:span>.</text:p>
      <text:p text:style-name="P4"><text:s/></text:p>
      <text:p text:style-name="P3"><text:soft-page-break/>The teams that thrive in the AI era will not necessarily have the largest models. They will have clearer specifications, stronger architectural standards, reusable context, and better constraint systems.</text:p>
      <text:p text:style-name="P4"><text:s/></text:p>
      <text:p text:style-name="P3">Agile optimized human-to-human communication.<text:line-break/><text:span text:style-name="T1">AI-native engineering optimizes human-to-LLM communication.</text:span></text:p>
      <text:p text:style-name="P4"><text:s/></text:p>
      <text:p text:style-name="P3">Documentation is no longer something you write <text:span text:style-name="T2">after</text:span> development. It actively <text:span text:style-name="T2">shapes</text:span> development. It constrains decisions. It defines boundaries. It guides implementation.</text:p>
      <text:p text:style-name="P4"><text:s/></text:p>
      <text:p text:style-name="P3">In many ways, it has become a new programming language—not one executed by machines directly, but one interpreted by AI systems on our behalf.</text:p>
      <text:p text:style-name="P4"><text:s/></text:p>
      <text:p text:style-name="P3"><text:span text:style-name="T1">Agile didn't kill documentation.</text:span><text:line-break/><text:span text:style-name="T1">AI has completed its transformation.</text:span></text:p>
      <text:p text:style-name="P4"><text:s/></text:p>
      <text:p text:style-name="P3">Documentation is no longer an artifact.<text:line-break/><text:span text:style-name="T1">Documentation is becoming code.</text:span></text:p>
      <text:p text:style-name="P4"><text:s/></text:p>
      <text:p text:style-name="P5"/>
      <text:p text:style-name="P4"><text:s/></text:p>
      <text:p text:style-name="P3"><text:span text:style-name="T2">— Sean Wong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Noto Serif SC"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Noto Serif SC"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000000" loext:opacity="100%" fo:font-size="20pt" fo:font-weight="bold" style:font-size-asian="20pt" style:font-weight-asian="bold" style:font-size-complex="20pt" style:font-weight-complex="bold"/>
    </style:style>
    <style:style style:name="Heading_20_2" style:display-name="Heading 2" style:family="paragraph" style:parent-style-name="Heading" style:class="chapter">
      <style:text-properties fo:color="#000000" loext:opacity="100%" fo:font-size="18pt" fo:font-weight="bold" style:font-size-asian="18pt" style:font-weight-asian="bold" style:font-size-complex="18pt" style:font-weight-complex="bold"/>
    </style:style>
    <style:style style:name="Heading_20_3" style:display-name="Heading 3" style:family="paragraph" style:parent-style-name="Heading" style:class="chapter">
      <style:text-properties fo:color="#000000" loext:opacity="100%" fo:font-size="16pt" fo:font-weight="bold" style:font-size-asian="16pt" style:font-weight-asian="bold" style:font-size-complex="16pt" style:font-weight-complex="bold"/>
    </style:style>
    <style:style style:name="Heading_20_4" style:display-name="Heading 4" style:family="paragraph" style:parent-style-name="Heading" style:class="chapter">
      <style:text-properties fo:color="#000000" loext:opacity="100%" fo:font-size="14pt" fo:font-weight="bold" style:font-size-asian="14pt" style:font-weight-asian="bold" style:font-size-complex="14pt" style:font-weight-complex="bold"/>
    </style:style>
    <style:style style:name="Heading_20_5" style:display-name="Heading 5" style:family="paragraph" style:parent-style-name="Heading" style:class="chapter">
      <style:text-properties fo:color="#000000" loext:opacity="100%" fo:font-size="12pt" fo:font-weight="bold" style:font-size-asian="12pt" style:font-weight-asian="bold" style:font-size-complex="12pt" style:font-weight-complex="bold"/>
    </style:style>
    <style:style style:name="Heading_20_6" style:display-name="Heading 6" style:family="paragraph" style:parent-style-name="Heading" style:class="chapter">
      <style:text-properties fo:color="#000000" loext:opacity="100%" fo:font-size="10pt" fo:font-weight="bold" style:font-size-asian="10pt" style:font-weight-asian="bold" style:font-size-complex="10pt" style:font-weight-complex="bold"/>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space" fo:text-indent="-0.1252in" fo:margin-left="0.166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space" fo:text-indent="-0.1252in" fo:margin-left="0.4583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space" fo:text-indent="-0.1252in" fo:margin-left="0.7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space" fo:text-indent="-0.1252in" fo:margin-left="1.0417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space" fo:text-indent="-0.1252in" fo:margin-left="1.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space" fo:text-indent="-0.1252in" fo:margin-left="1.625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space" fo:text-indent="-0.1252in" fo:margin-left="1.916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space" fo:text-indent="-0.1252in" fo:margin-left="2.2083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space" fo:text-indent="-0.1252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dc:creator>Un-named</dc:creator>
    <meta:editing-cycles>1</meta:editing-cycles>
    <meta:creation-date>2026-06-05T15:21:35.919000000</meta:creation-date>
    <dc:date>2026-06-05T15:21:35.919000000</dc:date>
    <meta:document-statistic meta:table-count="0" meta:image-count="0" meta:object-count="0" meta:page-count="7" meta:paragraph-count="159" meta:word-count="1092" meta:character-count="7533" meta:non-whitespace-character-count="6457"/>
    <meta:generator>LibreOffice/26.2.3.2$Windows_X86_64 LibreOffice_project/70e089b17412e4cb7773e41413306b17a2328c34</meta:generator>
  </office:meta>
</office:document-meta>
</file>