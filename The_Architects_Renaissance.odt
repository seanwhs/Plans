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fo:font-weight="bold" officeooo:paragraph-rsid="00102a3e" style:font-weight-asian="bold" style:font-weight-complex="bold"/>
    </style:style>
    <style:style style:name="P2" style:family="paragraph">
      <style:paragraph-properties fo:text-align="center"/>
    </style:style>
    <style:style style:name="P3" style:family="paragraph" style:parent-style-name="Standard">
      <style:paragraph-properties fo:margin-top="0in" fo:margin-bottom="0.0835in" style:contextual-spacing="false" fo:text-align="justify" style:justify-single-word="false"/>
      <style:text-properties officeooo:paragraph-rsid="000c8624"/>
    </style:style>
    <style:style style:name="P4" style:family="paragraph" style:parent-style-name="Standard">
      <style:paragraph-properties fo:margin-top="0in" fo:margin-bottom="0.139in" style:contextual-spacing="false" fo:text-align="justify" style:justify-single-word="false"/>
      <style:text-properties officeooo:paragraph-rsid="000c8624"/>
    </style:style>
    <style:style style:name="P5" style:family="paragraph" style:parent-style-name="Standard">
      <style:paragraph-properties fo:margin-top="0in" fo:margin-bottom="0.139in" style:contextual-spacing="false"/>
      <style:text-properties officeooo:paragraph-rsid="000c8624"/>
    </style:style>
    <style:style style:name="P6" style:family="paragraph" style:parent-style-name="List_20_Paragraph" style:list-style-name="WWNum2">
      <style:paragraph-properties fo:margin-top="0in" fo:margin-bottom="0.0693in" style:contextual-spacing="false" fo:text-align="left" style:justify-single-word="false"/>
      <style:text-properties officeooo:paragraph-rsid="000c8624"/>
    </style:style>
    <style:style style:name="P7" style:family="paragraph" style:parent-style-name="Standard">
      <loext:graphic-properties draw:fill="solid" draw:fill-color="#000000"/>
      <style:paragraph-properties fo:margin-left="0.1665in" fo:margin-right="0.1665in" fo:margin-top="0.111in" fo:margin-bottom="0.139in" style:contextual-spacing="false" fo:text-align="left" style:justify-single-word="false" fo:background-color="#000000"/>
      <style:text-properties officeooo:paragraph-rsid="000c8624"/>
    </style:style>
    <style:style style:name="P8" style:family="paragraph" style:parent-style-name="Standard">
      <style:paragraph-properties fo:margin-top="0in" fo:margin-bottom="0.0835in" style:contextual-spacing="false" fo:text-align="left" style:justify-single-word="false"/>
      <style:text-properties officeooo:paragraph-rsid="000c8624"/>
    </style:style>
    <style:style style:name="P9" style:family="paragraph" style:parent-style-name="Standard">
      <style:paragraph-properties fo:margin-top="0in" fo:margin-bottom="0.0835in" style:contextual-spacing="false" fo:text-align="justify" style:justify-single-word="false"/>
      <style:text-properties fo:font-style="italic" fo:font-weight="bold" officeooo:paragraph-rsid="000c8624" style:font-style-asian="italic" style:font-weight-asian="bold" style:font-style-complex="italic" style:font-weight-complex="bold"/>
    </style:style>
    <style:style style:name="T1" style:family="text">
      <style:text-properties officeooo:rsid="00102a3e"/>
    </style:style>
    <style:style style:name="T2" style:family="text">
      <style:text-properties fo:font-weight="bold" style:font-weight-asian="bold" style:font-weight-complex="bold"/>
    </style:style>
    <style:style style:name="T3" style:family="text">
      <style:text-properties fo:color="#ffffff" loext:opacity="100%" fo:font-family="'Courier New'" style:font-family-generic="roman" style:font-pitch="variable" fo:font-size="10pt" style:font-family-asian="'Courier New'" style:font-family-generic-asian="system" style:font-pitch-asian="variable" style:font-size-asian="10pt" style:font-family-complex="'Courier New'" style:font-family-generic-complex="system" style:font-pitch-complex="variable" style:font-size-complex="10pt"/>
    </style:style>
    <style:style style:name="T4" style:family="text">
      <style:text-properties fo:font-family="'Courier New'" style:font-family-generic="roman" style:font-pitch="variable" fo:background-color="#f1f5f9" loext:char-shading-value="0" style:font-family-asian="'Courier New'" style:font-family-generic-asian="system" style:font-pitch-asian="variable" style:font-family-complex="'Courier New'" style:font-family-generic-complex="system" style:font-pitch-complex="variable"/>
    </style:style>
    <style:style style:name="T5" style:family="text">
      <style:text-properties fo:font-style="italic" style:font-style-asian="italic" style:font-style-complex="italic"/>
    </style:style>
    <style:style style:name="T6" style:family="text">
      <style:text-properties officeooo:rsid="001158e2"/>
    </style:style>
    <style:style style:name="T7" style:family="text">
      <style:text-properties fo:font-style="italic" fo:font-weight="bold" style:font-style-asian="italic" style:font-weight-asian="bold" style:font-style-complex="italic" style:font-weight-complex="bold"/>
    </style:style>
    <style:style style:name="fr1" style:family="graphic" style:parent-style-name="Inline_20_Heading">
      <style:graphic-properties style:vertical-pos="middle" style:vertical-rel="text"/>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Architect's Renaissance</text:p>
      <text:p text:style-name="Subtitle">AI is Fueling the Rise of the Solopreneur</text:p>
      <text:p text:style-name="P1"><text:span text:style-name="T1">An Opinion Piece 💠 </text:span>Sean Wong 💠 July 3, 2026</text:p>
      <text:p text:style-name="Standard"/>
      <text:h text:style-name="Heading_20_1" text:outline-level="1"><draw:line text:anchor-type="paragraph" draw:z-index="0" draw:name="Line 1" draw:style-name="gr1" draw:text-style-name="P2" svg:x1="-0.0646in" svg:y1="0.0681in" svg:x2="6.352in" svg:y2="0.0598in"><text:p/></draw:line>Introduction</text:h>
      <text:p text:style-name="Standard"/>
      <text:p text:style-name="P3">We are witnessing the most profound transformation in software engineering since the rise of cloud-native computing, distributed systems, and container orchestration. The industry is undergoing a seismic shift: away from the endless friction, coordination costs, and bureaucratic drag of large human organizations, and toward architect-led, agent-orchestrated systems that operate with unprecedented speed and coherence.</text:p>
      <text:p text:style-name="P4"><text:s/></text:p>
      <text:p text:style-name="P3">This is far more than an efficiency upgrade. It represents a complete redefinition of who can build ambitious software, how software gets built, what roles create the most value, and where distinctly human strengths matter most in the development lifecycle.</text:p>
      <text:p text:style-name="P4"><text:s/></text:p>
      <text:p text:style-name="P3">For decades, software engineering prized raw implementation capacity above all else. Companies scaled by hiring more developers, forming more teams, adding layers of specialists, and constructing increasingly elaborate management structures to coordinate them. Yet as organizations expanded, they inevitably encountered their greatest hidden liability: the <text:span text:style-name="T2">synchronization tax</text:span>—the massive overhead of communication, handoffs, context loss, and alignment that often outpaced actual progress.</text:p>
      <text:p text:style-name="P4"><text:s/></text:p>
      <text:p text:style-name="P4"/>
      <text:p text:style-name="P4"/>
      <text:p text:style-name="P4"/>
      <text:p text:style-name="P4"/>
      <text:p text:style-name="P4"/>
      <text:p text:style-name="P4"/>
      <text:p text:style-name="P4"/>
      <text:p text:style-name="P3"><text:soft-page-break/>Artificial intelligence, particularly systems of specialized agents, is now eliminating that tax. Implementation—the repetitive labor of writing boilerplate, CRUD operations, integration layers, scaffolding, and routine business logic—has become heavily commoditized. What remains rare, valuable, and irreplaceably human are higher-order capabilities:</text:p>
      <text:p text:style-name="P5"><text:s/></text:p>
      <text:list text:style-name="WWNum2">
        <text:list-item text:start-value="1">
          <text:p text:style-name="P6">Strategic intent and vision <text:s/></text:p>
        </text:list-item>
        <text:list-item>
          <text:p text:style-name="P6">Sound judgment under uncertainty <text:s/></text:p>
        </text:list-item>
        <text:list-item>
          <text:p text:style-name="P6">Elegant system architecture <text:s/></text:p>
        </text:list-item>
        <text:list-item>
          <text:p text:style-name="P6">Constraint and tradeoff engineering <text:s/></text:p>
        </text:list-item>
        <text:list-item>
          <text:p text:style-name="P6">Intelligent orchestration <text:s/></text:p>
        </text:list-item>
        <text:list-item>
          <text:p text:style-name="P6">Rigorous verification and evaluation <text:s/></text:p>
        </text:list-item>
        <text:list-item>
          <text:p text:style-name="P6">Refined taste, prioritization, and long-term stewardship</text:p>
        </text:list-item>
      </text:list>
      <text:p text:style-name="P5"><text:s/></text:p>
      <text:p text:style-name="P3">The outcome is transformative. A new archetype is emerging: <text:span text:style-name="T2">the Architect-Solopreneur</text:span>—a single skilled individual empowered to design, orchestrate, verify, and ship sophisticated systems that once demanded entire departments.</text:p>
      <text:p text:style-name="P5"><text:s/></text:p>
      <text:h text:style-name="Heading_20_1" text:outline-level="1">The Death of the Synchronization Tax</text:h>
      <text:p text:style-name="P3">Traditional software organizations rested on a foundational assumption: complex software requires large teams. This belief molded decades of practice—Agile rituals, Scrum ceremonies, Team Topologies, program management offices, matrix structures, enterprise architecture boards, and exhaustive dependency processes.</text:p>
      <text:p text:style-name="P5"><text:s/></text:p>
      <text:p text:style-name="P5"/>
      <text:p text:style-name="P5"/>
      <text:p text:style-name="P5"/>
      <text:p text:style-name="P5"/>
      <text:p text:style-name="P5"/>
      <text:p text:style-name="P5"/>
      <text:p text:style-name="P5"/>
      <text:p text:style-name="P5"/>
      <text:p text:style-name="P3"><text:soft-page-break/>In theory, adding headcount increased delivery power. In reality, coordination costs often grew faster than output. The classic enterprise delivery pipeline reveals the problem:</text:p>
      <text:p text:style-name="P5"><text:s/></text:p>
      <text:p text:style-name="P7"><text:span text:style-name="T3"><text:s text:c="9"/></text:span><text:line-break/><text:span text:style-name="T3"> <text:s text:c="3"/>Product Manager <text:s text:c="3"/></text:span><text:line-break/><text:span text:style-name="T3"> <text:s text:c="7"/>↓ <text:s text:c="3"/></text:span><text:line-break/><text:span text:style-name="T3"> <text:s text:c="3"/>Business Analysts <text:s text:c="3"/></text:span><text:line-break/><text:span text:style-name="T3"> <text:s text:c="7"/>↓ <text:s text:c="3"/></text:span><text:line-break/><text:span text:style-name="T3"> <text:s text:c="3"/>Solution Architects <text:s text:c="3"/></text:span><text:line-break/><text:span text:style-name="T3"> <text:s text:c="7"/>↓ <text:s text:c="3"/></text:span><text:line-break/><text:span text:style-name="T3"> <text:s text:c="3"/>Backend Teams <text:s text:c="3"/></text:span><text:line-break/><text:span text:style-name="T3"> <text:s text:c="7"/>↓ <text:s text:c="3"/></text:span><text:line-break/><text:span text:style-name="T3"> <text:s text:c="3"/>Frontend Teams <text:s text:c="3"/></text:span><text:line-break/><text:span text:style-name="T3"> <text:s text:c="7"/>↓ <text:s text:c="3"/></text:span><text:line-break/><text:span text:style-name="T3"> <text:s text:c="3"/>Security &amp; Compliance <text:s text:c="3"/></text:span><text:line-break/><text:span text:style-name="T3"> <text:s text:c="7"/>↓ <text:s text:c="3"/></text:span><text:line-break/><text:span text:style-name="T3"> <text:s text:c="3"/>QA &amp; Testing Teams <text:s text:c="3"/></text:span><text:line-break/><text:span text:style-name="T3"> <text:s text:c="7"/>↓ <text:s text:c="3"/></text:span><text:line-break/><text:span text:style-name="T3"> <text:s text:c="3"/>DevOps &amp; SRE <text:s text:c="3"/></text:span><text:line-break/><text:span text:style-name="T3"> <text:s text:c="7"/>↓ <text:s text:c="3"/></text:span><text:line-break/><text:span text:style-name="T3"> <text:s text:c="3"/>Release Management <text:s text:c="3"/></text:span><text:line-break/><text:span text:style-name="T3"> <text:s text:c="8"/></text:span></text:p>
      <text:p text:style-name="P5"><text:s/></text:p>
      <text:p text:style-name="P8">Every handoff introduces hidden costs: context loss, delays, misinterpretations, approval queues, political friction, organizational overhead, and knowledge fragmentation. Large engineering groups frequently spend more energy coordinating than creating. Standups become status theater. Meetings turn into dependency negotiations. Documentation grows stale. Critical knowledge lives in scattered conversations and individual heads. Scaling teams increasingly means scaling communication rather than production.</text:p>
      <text:p text:style-name="P5"><text:s/></text:p>
      <text:h text:style-name="Heading_20_1" text:outline-level="1">The Great Inversion: Human as Orchestrator</text:h>
      <text:p text:style-name="P8">AI agents invert this outdated model. The principal architect no longer manages layers of people. Instead, they focus on shaping:</text:p>
      <text:p text:style-name="P5"><text:s/></text:p>
      <text:list text:continue-numbering="true" text:style-name="WWNum2">
        <text:list-item>
          <text:p text:style-name="P6">Clear intent and success criteria <text:s/></text:p>
        </text:list-item>
        <text:list-item>
          <text:p text:style-name="P6">Explicit constraints and policies <text:s/></text:p>
        </text:list-item>
        <text:list-item>
          <text:p text:style-name="P6">Formal contracts and interfaces <text:s/></text:p>
        </text:list-item>
        <text:list-item>
          <text:p text:style-name="P6">Observable workflows and orchestration graphs <text:s/></text:p>
        </text:list-item>
        <text:list-item>
          <text:p text:style-name="P6">Robust verification systems and governance rules</text:p>
        </text:list-item>
      </text:list>
      <text:p text:style-name="P5"><text:s/></text:p>
      <text:p text:style-name="P8"><text:soft-page-break/>This marks the decisive shift from <text:span text:style-name="T2">Human-as-Worker</text:span> to <text:span text:style-name="T2">Human-as-Orchestrator</text:span>.</text:p>
      <text:p text:style-name="P5"><text:s/></text:p>
      <text:p text:style-name="P8">A single architect can now direct a dynamic organization of specialized agents that operate in parallel, share persistent memory, execute at machine speed, follow deterministic processes, and maintain near-perfect consistency under defined governance.</text:p>
      <text:p text:style-name="P5"><text:s/></text:p>
      <text:p text:style-name="P8">The true breakthrough is not that AI can generate code. It is that <text:span text:style-name="T2">one human can effectively lead and coordinate an entire software organization</text:span>.</text:p>
      <text:p text:style-name="P5"><text:s/></text:p>
      <text:h text:style-name="Heading_20_1" text:outline-level="1">A Typical Agentic Workflow: From Intent to Deployed Reality</text:h>
      <text:p text:style-name="P3">Here is how a real-world project flows in the architect-solopreneur model. The human architect provides strategic direction and final judgment, while agents handle the heavy lifting of decomposition, execution, and verification.</text:p>
      <text:p text:style-name="P5"><text:s/></text:p>
      <text:p text:style-name="P8"><text:span text:style-name="T2"><draw:frame draw:style-name="fr1" draw:name="Frame1" text:anchor-type="as-char" draw:z-index="1"><draw:text-box fo:min-height="0in" fo:min-width="0in"><text:p text:style-name="Heading_20_3">Phase 1: Intent Definition (Primarily Human)</text:p></draw:text-box></draw:frame></text:span><text:line-break/>The architect begins by crafting high-fidelity intent artifacts that capture the soul of the project.</text:p>
      <text:p text:style-name="P5"><text:s/></text:p>
      <text:list text:continue-numbering="true" text:style-name="WWNum2">
        <text:list-item>
          <text:p text:style-name="P6"><text:span text:style-name="T4">INTENT.md</text:span>: Narrative vision, user stories, business outcomes, success metrics, and non-negotiables. <text:s/></text:p>
        </text:list-item>
        <text:list-item>
          <text:p text:style-name="P6"><text:span text:style-name="T4">PROJECT_GOALS.yaml</text:span>: Structured, machine-readable objectives, priorities, KPIs, tech preferences, scalability targets, and compliance needs. <text:s/></text:p>
        </text:list-item>
        <text:list-item>
          <text:p text:style-name="P6"><text:span text:style-name="T4">TRADEOFFS.md</text:span>: Explicit documentation of key decisions and accepted tradeoffs. <text:s/></text:p>
        </text:list-item>
        <text:list-item>
          <text:p text:style-name="P6"><text:span text:style-name="T4">RISK_REGISTER.md</text:span>: Early identification of business, technical, and market risks.</text:p>
        </text:list-item>
      </text:list>
      <text:p text:style-name="P5"><text:s/></text:p>
      <text:p text:style-name="P3">These documents encode the <text:span text:style-name="T5">why</text:span> and define what success looks like. The architect owns and periodically revises them.</text:p>
      <text:p text:style-name="P5"><text:s/></text:p>
      <text:p text:style-name="P5"/>
      <text:p text:style-name="P5"/>
      <text:p text:style-name="P5"/>
      <text:p text:style-name="P8"><text:soft-page-break/><text:span text:style-name="T2"><draw:frame draw:style-name="fr1" draw:name="Frame2" text:anchor-type="as-char" draw:z-index="2"><draw:text-box fo:min-height="0in" fo:min-width="0in"><text:p text:style-name="Heading_20_3">Phase 2: Planning &amp; Decomposition (Human + Planner Agent)</text:p></draw:text-box></draw:frame></text:span><text:line-break/>The architect provides high-level guidance, then activates planning agents.</text:p>
      <text:p text:style-name="P5"><text:s/></text:p>
      <text:p text:style-name="P8">Artifacts produced or refined here include: <text:s/></text:p>
      <text:list text:continue-numbering="true" text:style-name="WWNum2">
        <text:list-item>
          <text:p text:style-name="P6"><text:span text:style-name="T4">PLAN.md</text:span>: Narrative overview of the approach. <text:s/></text:p>
        </text:list-item>
        <text:list-item>
          <text:p text:style-name="P6"><text:span text:style-name="T4">TASK_GRAPH.json</text:span>: Executable DAG breaking work into atomic, dependent tasks with assigned agents. <text:s/></text:p>
        </text:list-item>
        <text:list-item>
          <text:p text:style-name="P6"><text:span text:style-name="T4">DEPENDENCY_MAP.json</text:span>: Integration points and external contracts. <text:s/></text:p>
        </text:list-item>
        <text:list-item>
          <text:p text:style-name="P6"><text:span text:style-name="T4">ROADMAP.md</text:span>: Phased timeline with milestones. <text:s/></text:p>
        </text:list-item>
        <text:list-item>
          <text:p text:style-name="P6">Architecture Decision Records (ADRs).</text:p>
        </text:list-item>
      </text:list>
      <text:p text:style-name="P5"><text:s/></text:p>
      <text:p text:style-name="P8">The architect reviews and approves the final plan.</text:p>
      <text:p text:style-name="P5"><text:s/></text:p>
      <text:p text:style-name="P8"><text:span text:style-name="T2"><draw:frame draw:style-name="fr1" draw:name="Frame3" text:anchor-type="as-char" draw:z-index="3"><draw:text-box fo:min-height="0in" fo:min-width="0in"><text:p text:style-name="Heading_20_3">Phase 3: Contract Definition (Human + Contract Agents)</text:p></draw:text-box></draw:frame></text:span><text:line-break/>The architect shapes core domain rules and non-functional requirements. Agents then generate: <text:s/></text:p>
      <text:list text:continue-numbering="true" text:style-name="WWNum2">
        <text:list-item>
          <text:p text:style-name="P6">OpenAPI / AsyncAPI specifications. <text:s/></text:p>
        </text:list-item>
        <text:list-item>
          <text:p text:style-name="P6">Database schemas and migration scripts. <text:s/></text:p>
        </text:list-item>
        <text:list-item>
          <text:p text:style-name="P6">Event contracts and message schemas. <text:s/></text:p>
        </text:list-item>
        <text:list-item>
          <text:p text:style-name="P6">Frontend component contracts and design tokens. <text:s/></text:p>
        </text:list-item>
        <text:list-item>
          <text:p text:style-name="P6">Infrastructure-as-code definitions.</text:p>
        </text:list-item>
      </text:list>
      <text:p text:style-name="P5"><text:s/></text:p>
      <text:p text:style-name="P8"><text:span text:style-name="T2"><draw:frame draw:style-name="fr1" draw:name="Frame4" text:anchor-type="as-char" draw:z-index="4"><draw:text-box fo:min-height="0in" fo:min-width="0in"><text:p text:style-name="Heading_20_3">Phase 4: Parallel Execution (Specialized Agent Teams)</text:p></draw:text-box></draw:frame></text:span><text:line-break/>Agents work concurrently: <text:s/></text:p>
      <text:list text:continue-numbering="true" text:style-name="WWNum2">
        <text:list-item>
          <text:p text:style-name="P6"><text:span text:style-name="T2">Frontend Agent</text:span>: UI components, state management, accessibility compliance, Storybook, and E2E tests. <text:s/></text:p>
        </text:list-item>
        <text:list-item>
          <text:p text:style-name="P6"><text:span text:style-name="T2">Backend Agent</text:span>: Domain logic, APIs, authentication, and integration tests. <text:s/></text:p>
        </text:list-item>
        <text:list-item>
          <text:p text:style-name="P6"><text:span text:style-name="T2">Data Agent</text:span>: Schemas, pipelines, validation, and analytics models. <text:s/></text:p>
        </text:list-item>
        <text:list-item>
          <text:p text:style-name="P6"><text:span text:style-name="T2">DevOps Agent</text:span>: IaC, CI/CD pipelines, monitoring, and deployment configs. <text:s/></text:p>
        </text:list-item>
        <text:list-item>
          <text:p text:style-name="P6"><text:span text:style-name="T2">Security Agent</text:span>: Threat modeling, scans, and policy enforcement.</text:p>
        </text:list-item>
      </text:list>
      <text:p text:style-name="P5"><text:s/></text:p>
      <text:p text:style-name="P3">All changes are committed to the repository with traceable links to the task graph. </text:p>
      <text:p text:style-name="P8"><text:soft-page-break/><text:span text:style-name="T2"><draw:frame draw:style-name="fr1" draw:name="Frame5" text:anchor-type="as-char" draw:z-index="5"><draw:text-box fo:min-height="0in" fo:min-width="0in"><text:p text:style-name="Heading_20_3">Phase 5: Verification &amp; Quality Gates (Critic + Evaluation Agents)</text:p></draw:text-box></draw:frame></text:span><text:line-break/>Independent agents produce: <text:s/></text:p>
      <text:list text:continue-numbering="true" text:style-name="WWNum2">
        <text:list-item>
          <text:p text:style-name="P6">Comprehensive test reports and coverage metrics. <text:s/></text:p>
        </text:list-item>
        <text:list-item>
          <text:p text:style-name="P6"><text:span text:style-name="T4">SECURITY_REPORT.json</text:span> from multi-layered scans. <text:s/></text:p>
        </text:list-item>
        <text:list-item>
          <text:p text:style-name="P6">Performance, accessibility, and compliance reports. <text:s/></text:p>
        </text:list-item>
        <text:list-item>
          <text:p text:style-name="P6"><text:span text:style-name="T4">EVAL_SUMMARY.md</text:span> from the Critic Agent, which actively challenges assumptions and detects drift.</text:p>
        </text:list-item>
      </text:list>
      <text:p text:style-name="P5"><text:s/></text:p>
      <text:p text:style-name="P8">The architect reviews only high-level summaries and escalated issues.</text:p>
      <text:p text:style-name="P5"><text:s/></text:p>
      <text:p text:style-name="P3"><text:span text:style-name="T2"><draw:frame draw:style-name="fr1" draw:name="Frame6" text:anchor-type="as-char" draw:z-index="6"><draw:text-box fo:min-height="0in" fo:min-width="0in"><text:p text:style-name="Heading_20_3">Phase 6: Iteration</text:p></draw:text-box></draw:frame></text:span><text:line-break/>Based on verification results and critic feedback, the architect updates intent or constraints. The orchestration loop repeats rapidly.</text:p>
      <text:p text:style-name="P5"><text:s/></text:p>
      <text:p text:style-name="P3"><text:span text:style-name="T2"><draw:frame draw:style-name="fr1" draw:name="Frame7" text:anchor-type="as-char" draw:z-index="7"><draw:text-box fo:min-height="0in" fo:min-width="0in"><text:p text:style-name="Heading_20_3">Phase 7: Deployment &amp; Observability</text:p></draw:text-box></draw:frame></text:span><text:line-break/>Final artifacts include production-ready infrastructure, observability dashboards, alert rules, and a concise <text:span text:style-name="T4">PRODUCTION_HANDOVER.md</text:span> for ongoing stewardship.</text:p>
      <text:p text:style-name="P5"><text:s/></text:p>
      <text:p text:style-name="P3">This workflow compresses what once took months into days or weeks, with superior consistency and documentation.</text:p>
      <text:p text:style-name="P5"><text:s/></text:p>
      <text:h text:style-name="Heading_20_1" text:outline-level="1">The Force Multipliers of Agentic Success</text:h>
      <text:p text:style-name="P3">Unified organizational memory eliminates the telephone game. All agents share persistent context, artifacts, and history. Human latency collapses as agents perform analysis, testing, and compliance checks continuously in parallel. Standards become executable code rather than aspirational guidelines. Development transforms into a deterministic factory where the repository itself functions as architecture office, PMO, operations manual, and governance engine.</text:p>
      <text:p text:style-name="P5"><text:s/></text:p>
      <text:p text:style-name="P5"/>
      <text:h text:style-name="Heading_20_1" text:outline-level="1"><text:soft-page-break/>The Four Foundational Artifacts</text:h>
      <text:p text:style-name="P8"><text:span text:style-name="T2">Intent Artifacts</text:span> define purpose and boundaries.<text:line-break/><text:span text:style-name="T2">Planning Artifacts</text:span> externalize reasoning and structure.<text:line-break/><text:span text:style-name="T2">Contract Artifacts</text:span> create clear interfaces and eliminate ambiguity.<text:line-break/><text:span text:style-name="T2">Evaluation Artifacts</text:span> deliver independent proof that the system works as intended.</text:p>
      <text:p text:style-name="P5"><text:s/></text:p>
      <text:p text:style-name="P8">Together, these artifacts turn the repository into the living organization.</text:p>
      <text:p text:style-name="P5"><text:s/></text:p>
      <text:h text:style-name="Heading_20_1" text:outline-level="1">Designing the Agentic Organization</text:h>
      <text:p text:style-name="P3">The architect-solopreneur builds organizations that build software. Core specialized agents include Planner, Frontend, Backend, Data, Security, DevOps, and—most critically—the Critic Agent that prevents self-certification and surfaces flaws.</text:p>
      <text:p text:style-name="P5"><text:s/></text:p>
      <text:p text:style-name="P3">Instead of rigid hierarchies, work follows <text:span text:style-name="T6">this flow</text:span>: Intent → Planner → Task Graph → Specialized Agents → Verification Layer → Gated Deployment. Execution becomes parallel, observable, deterministic, and repeatable.</text:p>
      <text:p text:style-name="P5"><text:s/></text:p>
      <text:h text:style-name="Heading_20_1" text:outline-level="1">The Human Challenge: Debugging the Organization</text:h>
      <text:p text:style-name="P3">Agents are powerful but imperfect. They can hallucinate architectures, amplify bad assumptions, optimize wrong objectives, or create dangerous false confidence. The architect’s role therefore grows in importance: they debug entire systems of intelligence.</text:p>
      <text:p text:style-name="P5"><text:s/></text:p>
      <text:p text:style-name="P3">Debugging evolves from inspecting individual functions to analyzing orchestration traces, decision logs, dependency graphs, agent reasoning chains, and evaluation reports. Software engineering becomes organizational systems engineering.</text:p>
      <text:p text:style-name="P5"><text:s/></text:p>
      <text:p text:style-name="P5"/>
      <text:p text:style-name="P5"/>
      <text:p text:style-name="P5"/>
      <text:p text:style-name="P5"/>
      <text:h text:style-name="Heading_20_1" text:outline-level="1"><text:soft-page-break/>Why This Empowers the Solopreneur</text:h>
      <text:p text:style-name="P3">The architect-solopreneur transcends the role of developer or technical specialist. They simultaneously act as System Architect, Product Visionary, Organizational Designer, Systems Engineer, and Governance Authority. They no longer build every component—they design the intelligent factory that produces components at scale.</text:p>
      <text:p text:style-name="P5"><text:s/></text:p>
      <text:p text:style-name="P3">Implementation becomes abundant. Judgment, taste, and orchestration skill become priceless.</text:p>
      <text:p text:style-name="P5"><text:s/></text:p>
      <text:h text:style-name="Heading_20_1" text:outline-level="1">The New Competitive Advantage</text:h>
      <text:p text:style-name="P3">The defining skill of the AI era is no longer “How quickly can you write code?” but “How effectively can you design systems that transform clear intent into verified, production-ready reality?”</text:p>
      <text:p text:style-name="P5"><text:s/></text:p>
      <text:p text:style-name="P3">Mastery requires deep expertise in practical architecture, constraint engineering, artifact design, agent orchestration, verification systems, observability, governance, and workflow debugging.</text:p>
      <text:p text:style-name="P5"><text:s/></text:p>
      <text:h text:style-name="Heading_20_1" text:outline-level="1">The Architect's Renaissance</text:h>
      <text:p text:style-name="P9">The AI era does not mark the end of software engineering. It signals the beginning of its architectural renaissance.</text:p>
      <text:p text:style-name="P5"><text:s/></text:p>
      <text:p text:style-name="P3">Large, complex enterprises will continue to need human coordination at scale. But for the vast majority of products, startups, internal platforms, and business systems, one skilled architect working with intelligent agents will outperform what previously required dozens or hundreds of people.</text:p>
      <text:p text:style-name="P5"><text:s/></text:p>
      <text:p text:style-name="P3"><text:span text:style-name="T7">The solopreneur of 2026 is not a lone coder.</text:span> They are the architect of autonomous organizations. They do not merely build software—they build systems that build software. They do not manage human teams—they orchestrate networks of intelligence. They do not optimize labor—they optimize intent, clarity, and leverage.</text:p>
      <text:p text:style-name="P5"><text:s/></text:p>
      <text:p text:style-name="P8">AI is not replacing developers. It is liberating architects. <text:s/>And the age of <text:span text:style-name="T7">the Architect-Solopreneur has only just begu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paragraph-properties fo:margin-top="0.1665in" fo:margin-bottom="0.278in" style:contextual-spacing="false" fo:text-align="center" style:justify-single-word="false"/>
      <style:text-properties fo:color="#1f4e79" loext:opacity="100%" style:font-name="Arial1" fo:font-family="Arial" style:font-family-generic="swiss" style:font-pitch="variable" fo:font-size="24pt" fo:font-weight="bold" style:font-name-asian="Arial2" style:font-family-asian="Arial"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1" style:display-name="Heading 1" style:family="paragraph" style:parent-style-name="Heading" style:default-outline-level="1" style:list-style-name="" style:class="chapter">
      <style:paragraph-properties fo:margin-top="0.2083in" fo:margin-bottom="0.139in" style:contextual-spacing="false"/>
      <style:text-properties fo:color="#1f4e79"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1665in" fo:margin-bottom="0.111in" style:contextual-spacing="false"/>
      <style:text-properties fo:color="#2e75b6"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Heading" style:class="chapter">
      <style:paragraph-properties fo:margin-top="0.1665in" fo:margin-bottom="0.4165in" style:contextual-spacing="false" fo:text-align="center" style:justify-single-word="false"/>
      <style:text-properties style:font-name="Arial1" fo:font-family="Arial" style:font-family-generic="swiss" style:font-pitch="variable" fo:font-size="14pt" fo:font-style="italic" style:font-name-asian="Arial2" style:font-family-asian="Arial" style:font-family-generic-asian="system" style:font-pitch-asian="variable" style:font-size-asian="14pt" style:font-style-asian="italic" style:font-name-complex="Arial2" style:font-family-complex="Arial" style:font-family-generic-complex="system" style:font-pitch-complex="variable" style:font-size-complex="14pt" style:font-style-complex="italic"/>
    </style:style>
    <style:style style:name="Frame_20_contents" style:display-name="Frame contents" style:family="paragraph" style:parent-style-name="Standard"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space" fo:text-indent="-0.1252in" fo:margin-left="0.166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space" fo:text-indent="-0.1252in" fo:margin-left="0.4583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space" fo:text-indent="-0.1252in" fo:margin-left="0.7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space" fo:text-indent="-0.1252in" fo:margin-left="1.0417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space" fo:text-indent="-0.1252in" fo:margin-left="1.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space" fo:text-indent="-0.1252in" fo:margin-left="1.625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space" fo:text-indent="-0.1252in" fo:margin-left="1.916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space" fo:text-indent="-0.1252in" fo:margin-left="2.2083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space" fo:text-indent="-0.1252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10</meta:editing-cycles>
    <meta:creation-date>2026-07-03T00:28:44.606000000</meta:creation-date>
    <dc:date>2026-07-03T08:47:05.849217800</dc:date>
    <meta:editing-duration>PT17M15S</meta:editing-duration>
    <meta:generator>LibreOffice/26.2.4.2$Windows_X86_64 LibreOffice_project/0229ac93fcf0d7cbc6376066c6f35021cef002dc</meta:generator>
    <meta:document-statistic meta:table-count="0" meta:image-count="0" meta:object-count="0" meta:page-count="8" meta:paragraph-count="141" meta:word-count="1466" meta:character-count="11291" meta:non-whitespace-character-count="9665"/>
  </office:meta>
</office:document-meta>
</file>