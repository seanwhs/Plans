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OpenSymbol" svg:font-family="OpenSymbol" style:font-charset="x-symbol"/>
  </office:font-face-decls>
  <office:automatic-styles>
    <style:style style:name="Table1" style:family="table">
      <style:table-properties style:width="5.5in" fo:margin-left="-0.075in" fo:margin-top="0in" fo:margin-bottom="0in" table:align="left" style:writing-mode="lr-tb"/>
    </style:style>
    <style:style style:name="Table1.A" style:family="table-column">
      <style:table-column-properties style:column-width="2.75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A2" style:family="table-cell">
      <style:table-cell-properties fo:padding-left="0.075in" fo:padding-right="0.075in" fo:padding-top="0in" fo:padding-bottom="0in" fo:border="none" style:writing-mode="lr-tb"/>
    </style:style>
    <style:style style:name="Table1.B2" style:family="table-cell">
      <style:table-cell-properties fo:padding-left="0.075in" fo:padding-right="0.075in" fo:padding-top="0in" fo:padding-bottom="0in" fo:border="none" style:writing-mode="lr-tb"/>
    </style:style>
    <style:style style:name="Table1.A3" style:family="table-cell">
      <style:table-cell-properties fo:padding-left="0.075in" fo:padding-right="0.075in" fo:padding-top="0in" fo:padding-bottom="0in" fo:border="none" style:writing-mode="lr-tb"/>
    </style:style>
    <style:style style:name="Table1.B3" style:family="table-cell">
      <style:table-cell-properties fo:padding-left="0.075in" fo:padding-right="0.075in" fo:padding-top="0in" fo:padding-bottom="0in" fo:border="none" style:writing-mode="lr-tb"/>
    </style:style>
    <style:style style:name="Table1.A4" style:family="table-cell">
      <style:table-cell-properties fo:padding-left="0.075in" fo:padding-right="0.075in" fo:padding-top="0in" fo:padding-bottom="0in" fo:border="none" style:writing-mode="lr-tb"/>
    </style:style>
    <style:style style:name="Table1.B4" style:family="table-cell">
      <style:table-cell-properties fo:padding-left="0.075in" fo:padding-right="0.075in" fo:padding-top="0in" fo:padding-bottom="0in" fo:border="none" style:writing-mode="lr-tb"/>
    </style:style>
    <style:style style:name="Table1.A5" style:family="table-cell">
      <style:table-cell-properties fo:padding-left="0.075in" fo:padding-right="0.075in" fo:padding-top="0in" fo:padding-bottom="0in" fo:border="none" style:writing-mode="lr-tb"/>
    </style:style>
    <style:style style:name="Table1.B5" style:family="table-cell">
      <style:table-cell-properties fo:padding-left="0.075in" fo:padding-right="0.075in" fo:padding-top="0in" fo:padding-bottom="0in" fo:border="none" style:writing-mode="lr-tb"/>
    </style:style>
    <style:style style:name="Table1.A6" style:family="table-cell">
      <style:table-cell-properties fo:padding-left="0.075in" fo:padding-right="0.075in" fo:padding-top="0in" fo:padding-bottom="0in" fo:border="none" style:writing-mode="lr-tb"/>
    </style:style>
    <style:style style:name="Table1.B6" style:family="table-cell">
      <style:table-cell-properties fo:padding-left="0.075in" fo:padding-right="0.075in" fo:padding-top="0in" fo:padding-bottom="0in" fo:border="none" style:writing-mode="lr-tb"/>
    </style:style>
    <style:style style:name="Table1.A7" style:family="table-cell">
      <style:table-cell-properties fo:padding-left="0.075in" fo:padding-right="0.075in" fo:padding-top="0in" fo:padding-bottom="0in" fo:border="none" style:writing-mode="lr-tb"/>
    </style:style>
    <style:style style:name="Table1.B7" style:family="table-cell">
      <style:table-cell-properties fo:padding-left="0.075in" fo:padding-right="0.075in" fo:padding-top="0in" fo:padding-bottom="0in" fo:border="none" style:writing-mode="lr-tb"/>
    </style:style>
    <style:style style:name="P1" style:family="paragraph" style:parent-style-name="Subtitle">
      <style:text-properties officeooo:rsid="0016b391" officeooo:paragraph-rsid="0016b391"/>
    </style:style>
    <style:style style:name="P2" style:family="paragraph" style:parent-style-name="Standard">
      <style:text-properties fo:font-weight="bold" officeooo:paragraph-rsid="00102a3e" style:font-weight-asian="bold" style:font-weight-complex="bold"/>
    </style:style>
    <style:style style:name="P3" style:family="paragraph" style:parent-style-name="Heading_20_1">
      <style:text-properties fo:font-style="italic" fo:font-weight="bold" officeooo:paragraph-rsid="0016b391" style:font-style-asian="italic" style:font-weight-asian="bold" style:font-style-complex="italic" style:font-weight-complex="bold"/>
    </style:style>
    <style:style style:name="P4" style:family="paragraph">
      <style:paragraph-properties fo:text-align="center"/>
    </style:style>
    <style:style style:name="P5" style:family="paragraph" style:parent-style-name="Heading_20_2">
      <style:text-properties officeooo:paragraph-rsid="0016b391"/>
    </style:style>
    <style:style style:name="P6" style:family="paragraph" style:parent-style-name="Block_20_Text">
      <style:text-properties officeooo:paragraph-rsid="0016b391"/>
    </style:style>
    <style:style style:name="P7" style:family="paragraph" style:parent-style-name="Heading_20_1">
      <style:text-properties officeooo:paragraph-rsid="0016b391"/>
    </style:style>
    <style:style style:name="P8" style:family="paragraph" style:parent-style-name="First_20_Paragraph">
      <style:paragraph-properties fo:text-align="justify" style:justify-single-word="false"/>
      <style:text-properties officeooo:paragraph-rsid="0016b391"/>
    </style:style>
    <style:style style:name="P9" style:family="paragraph" style:parent-style-name="Text_20_body">
      <style:paragraph-properties fo:text-align="justify" style:justify-single-word="false"/>
      <style:text-properties officeooo:paragraph-rsid="0016b391"/>
    </style:style>
    <style:style style:name="P10" style:family="paragraph" style:parent-style-name="Text_20_body">
      <style:text-properties officeooo:paragraph-rsid="0016b391"/>
    </style:style>
    <style:style style:name="P11" style:family="paragraph" style:parent-style-name="First_20_Paragraph">
      <style:text-properties officeooo:paragraph-rsid="0016b391"/>
    </style:style>
    <style:style style:name="P12" style:family="paragraph" style:parent-style-name="Standard">
      <style:text-properties officeooo:paragraph-rsid="0016b391"/>
    </style:style>
    <style:style style:name="P13" style:family="paragraph" style:parent-style-name="Block_20_Text" style:list-style-name="L1">
      <style:text-properties officeooo:paragraph-rsid="0016b391"/>
    </style:style>
    <style:style style:name="P14" style:family="paragraph" style:parent-style-name="First_20_Paragraph">
      <style:text-properties fo:font-style="italic" fo:font-weight="bold" officeooo:paragraph-rsid="0016b391" style:font-style-asian="italic" style:font-weight-asian="bold" style:font-style-complex="italic" style:font-weight-complex="bold"/>
    </style:style>
    <style:style style:name="P15" style:family="paragraph" style:parent-style-name="Compact">
      <style:paragraph-properties fo:text-align="left" style:justify-single-word="false" fo:orphans="2" fo:widows="2"/>
      <style:text-properties fo:font-size="12pt" fo:language="en" fo:country="US" fo:font-weight="bold" officeooo:paragraph-rsid="0016b391" style:letter-kerning="false" style:font-size-asian="12pt" style:language-asian="en" style:country-asian="US" style:font-weight-asian="bold" style:font-size-complex="12pt" style:language-complex="ar" style:country-complex="SA" style:font-weight-complex="bold"/>
    </style:style>
    <style:style style:name="P16" style:family="paragraph" style:parent-style-name="Compact">
      <style:paragraph-properties fo:text-align="left" style:justify-single-word="false" fo:orphans="2" fo:widows="2"/>
      <style:text-properties fo:font-size="12pt" fo:language="en" fo:country="US" officeooo:paragraph-rsid="0016b391" style:letter-kerning="false" style:font-size-asian="12pt" style:language-asian="en" style:country-asian="US" style:font-size-complex="12pt" style:language-complex="ar" style:country-complex="SA"/>
    </style:style>
    <style:style style:name="P17" style:family="paragraph" style:parent-style-name="Block_20_Text" style:list-style-name="L2">
      <style:text-properties officeooo:paragraph-rsid="0016b391"/>
    </style:style>
    <style:style style:name="P18" style:family="paragraph" style:parent-style-name="Block_20_Text" style:list-style-name="L3">
      <style:text-properties officeooo:paragraph-rsid="0016b391"/>
    </style:style>
    <style:style style:name="P19" style:family="paragraph" style:parent-style-name="Block_20_Text">
      <style:text-properties fo:font-style="italic" fo:font-weight="bold" officeooo:paragraph-rsid="0016b391" style:font-style-asian="italic" style:font-weight-asian="bold" style:font-style-complex="italic" style:font-weight-complex="bold"/>
    </style:style>
    <style:style style:name="T1" style:family="text">
      <style:text-properties officeooo:rsid="00102a3e"/>
    </style:style>
    <style:style style:name="T2" style:family="text">
      <style:text-properties officeooo:rsid="0016b391"/>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8335in" fo:text-indent="-0.25in" fo:margin-left="0.833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835in" fo:text-indent="-0.25in" fo:margin-left="1.083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335in" fo:text-indent="-0.25in" fo:margin-left="1.333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835in" fo:text-indent="-0.25in" fo:margin-left="1.583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335in" fo:text-indent="-0.25in" fo:margin-left="1.833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835in" fo:text-indent="-0.25in" fo:margin-left="2.083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335in" fo:text-indent="-0.25in" fo:margin-left="2.333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835in" fo:text-indent="-0.25in" fo:margin-left="2.583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335in" fo:text-indent="-0.25in" fo:margin-left="2.833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835in" fo:text-indent="-0.25in" fo:margin-left="3.083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8335in" fo:text-indent="-0.25in" fo:margin-left="0.833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835in" fo:text-indent="-0.25in" fo:margin-left="1.083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335in" fo:text-indent="-0.25in" fo:margin-left="1.333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835in" fo:text-indent="-0.25in" fo:margin-left="1.583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335in" fo:text-indent="-0.25in" fo:margin-left="1.833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835in" fo:text-indent="-0.25in" fo:margin-left="2.083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335in" fo:text-indent="-0.25in" fo:margin-left="2.333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835in" fo:text-indent="-0.25in" fo:margin-left="2.583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335in" fo:text-indent="-0.25in" fo:margin-left="2.833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835in" fo:text-indent="-0.25in" fo:margin-left="3.083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8335in" fo:text-indent="-0.25in" fo:margin-left="0.833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835in" fo:text-indent="-0.25in" fo:margin-left="1.083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335in" fo:text-indent="-0.25in" fo:margin-left="1.333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835in" fo:text-indent="-0.25in" fo:margin-left="1.583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335in" fo:text-indent="-0.25in" fo:margin-left="1.833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835in" fo:text-indent="-0.25in" fo:margin-left="2.083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335in" fo:text-indent="-0.25in" fo:margin-left="2.333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835in" fo:text-indent="-0.25in" fo:margin-left="2.583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335in" fo:text-indent="-0.25in" fo:margin-left="2.833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835in" fo:text-indent="-0.25in" fo:margin-left="3.0835in"/>
        </style:list-level-properties>
        <style:text-properties fo:font-family="OpenSymbol"/>
      </text:list-level-style-bullet>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s AI Killing the Coder?</text:p>
      <text:p text:style-name="P1">Coder’s Giref</text:p>
      <text:p text:style-name="P2"><text:span text:style-name="T1">An Opinion Piece 💠 </text:span>Sean Wong 💠 July <text:span text:style-name="T2">6</text:span>, 2026</text:p>
      <text:p text:style-name="Standard"/>
      <text:h text:style-name="P3" text:outline-level="1"><draw:line text:anchor-type="paragraph" draw:z-index="0" draw:name="Line 1" draw:style-name="gr1" draw:text-style-name="P4" svg:x1="-0.15in" svg:y1="0.1626in" svg:x2="7.1083in" svg:y2="0.1291in"><text:p/></draw:line><text:tab/><text:tab/><text:tab/></text:h>
      <text:h text:style-name="P5" text:outline-level="2"><text:bookmark-start text:name="X46e1cf8d35b84bfcb7ce33ec2c8d5a4105efefc"/><text:bookmark-start text:name="is-ai-killing-the-coder"/>The Hard Truth About the End of Factory Floor Programming</text:h>
      <text:p text:style-name="P6"><text:span text:style-name="T3">For fifty years, software engineering rewarded the ability to translate human intent into machine syntax.</text:span></text:p>
      <text:p text:style-name="P6"><text:span text:style-name="T3">For the next fifty, it will reward the ability to transform human intent into verified reality.</text:span></text:p>
      <text:h text:style-name="P7" text:outline-level="1"><text:bookmark-end text:name="is-ai-killing-the-coder"/><text:bookmark-end text:name="X46e1cf8d35b84bfcb7ce33ec2c8d5a4105efefc"/></text:h>
      <text:h text:style-name="P7" text:outline-level="1"><text:bookmark-start text:name="the-quiet-panic-nobody-wants-to-admit"/>The Quiet Panic Nobody Wants to Admit</text:h>
      <text:p text:style-name="P8">A quiet panic is spreading through software engineering.</text:p>
      <text:p text:style-name="P9">You can see it in Slack channels. Hear it during architecture reviews. Feel it in executive meetings. And increasingly, you can find it in the private thoughts of engineers everywhere.</text:p>
      <text:p text:style-name="P9">The sequence is almost always the same.</text:p>
      <text:p text:style-name="P9">Someone shares a demo of an AI agent building an entire application in minutes. Someone else posts benchmarks showing autonomous agents outperforming junior developers on coding tasks. A third person forwards another article announcing the imminent death of software engineering.</text:p>
      <text:p text:style-name="P9"/>
      <text:p text:style-name="P10">Then comes the question nobody wants to ask out loud:</text:p>
      <text:p text:style-name="P6"><text:span text:style-name="T4">“If AI can write the code, what exactly is my value?”</text:span></text:p>
      <text:p text:style-name="P11"/>
      <text:p text:style-name="P11"/>
      <text:p text:style-name="P11"><text:soft-page-break/></text:p>
      <text:p text:style-name="P8">This question sits at the center of the industry’s current anxiety. Not because engineers fear technology—software engineers have always embraced technological change. What they fear is something far more fundamental:</text:p>
      <text:p text:style-name="P10"/>
      <text:p text:style-name="P6"><text:span text:style-name="T4">The possibility that the thing they spent years mastering is no longer the thing that creates value.</text:span></text:p>
      <text:p text:style-name="P11"/>
      <text:p text:style-name="P8">And that fear deserves to be taken seriously. Because AI is not merely disrupting software engineering. It is disrupting our <text:span text:style-name="T3">definition</text:span> of software engineering itself.</text:p>
      <text:p text:style-name="P12"><text:bookmark-end text:name="the-quiet-panic-nobody-wants-to-admit"/></text:p>
      <text:h text:style-name="P7" text:outline-level="1"><text:bookmark-start text:name="the-end-of-the-factory-floor"/>The End of the Factory Floor</text:h>
      <text:p text:style-name="P11">For decades, software development operated on an industrial model.</text:p>
      <text:p text:style-name="P9">Requirements entered one side of the factory. Software emerged from the other. Junior engineers implemented. Senior engineers reviewed. Architects approved. Managers coordinated.</text:p>
      <text:p text:style-name="P10">The entire profession was built on one foundational assumption:</text:p>
      <text:p text:style-name="P10"/>
      <text:p text:style-name="P6"><text:span text:style-name="T4">Implementation is scarce.</text:span></text:p>
      <text:p text:style-name="P11"/>
      <text:p text:style-name="P8">This assumption shaped everything: hiring, promotion, team structures, engineering processes, delivery metrics, compensation, and professional identity. If implementation is expensive, then people who can implement quickly become valuable.</text:p>
      <text:p text:style-name="P10">This logic made perfect sense.</text:p>
      <text:p text:style-name="P10">Until implementation stopped being expensive.</text:p>
      <text:p text:style-name="P9">Today, AI agents can generate application code, infrastructure definitions, test suites, deployment pipelines, database migrations, monitoring instrumentation, documentation, and operational runbooks—in a fraction of the time required by traditional teams.</text:p>
      <text:p text:style-name="P10">The economics of software production have fundamentally changed. And whenever economics change, professions change.</text:p>
      <text:p text:style-name="P12"><text:bookmark-end text:name="the-end-of-the-factory-floor"/></text:p>
      <text:h text:style-name="P7" text:outline-level="1"><text:bookmark-start text:name="why-the-horse-analogy-fails"/><text:soft-page-break/>Why the Horse Analogy Fails</text:h>
      <text:p text:style-name="P8">Many commentators compare AI to the automobile replacing the horse. The argument is straightforward: cars replaced horses, so AI will replace programmers.</text:p>
      <text:p text:style-name="P10">It is an elegant analogy. It is also wrong.</text:p>
      <text:p text:style-name="P10">The mistake lies in assuming that demand for software is fixed. It isn’t.</text:p>
      <text:p text:style-name="P9">Software is becoming the operating system of civilization itself. Every company is becoming a software company. Every process is becoming a software process. Every product is becoming a software product.</text:p>
      <text:p text:style-name="P9">As the cost of creating software approaches zero, demand will not contract. It will explode.</text:p>
      <text:p text:style-name="P9">History demonstrates this repeatedly. When the cost of producing something important collapses, humanity does not consume less of it. We consume exponentially more.</text:p>
      <text:p text:style-name="P9">We did not produce fewer books after the printing press. We did not create fewer videos after digital cameras. We did not communicate less after the internet. We produced more. Far more.</text:p>
      <text:p text:style-name="P10">The same phenomenon is now unfolding in software.</text:p>
      <text:p text:style-name="P10">The question is not:</text:p>
      <text:p text:style-name="P6"><text:span text:style-name="T4">Will there be software engineers?</text:span></text:p>
      <text:p text:style-name="P11">The question is:</text:p>
      <text:p text:style-name="P6"><text:span text:style-name="T4">What kind of software engineers will create value?</text:span></text:p>
      <text:p text:style-name="P12"><text:bookmark-end text:name="why-the-horse-analogy-fails"/></text:p>
      <text:h text:style-name="P7" text:outline-level="1"><text:bookmark-start text:name="the-death-of-the-syntax-barrier"/>The Death of the Syntax Barrier</text:h>
      <text:p text:style-name="P11">For decades, software engineers occupied a privileged position as translators.</text:p>
      <text:p text:style-name="P9">Businesses possessed intent. Computers required syntax. Engineers bridged the gap. That translation barrier created enormous economic value because syntax itself was scarce.</text:p>
      <text:p text:style-name="P9">Understanding programming languages, frameworks, APIs, operating systems, infrastructure, deployment models, and implementation patterns was difficult. Difficulty created scarcity. Scarcity created value.</text:p>
      <text:p text:style-name="P10">AI has shattered that barrier.</text:p>
      <text:p text:style-name="P9">Syntax is no longer scarce. Syntax is becoming infrastructure. And when a capability becomes infrastructure, it stops being the defining characteristic of a profession.</text:p>
      <text:p text:style-name="P9"><text:soft-page-break/>This creates an uncomfortable reality. If your primary value comes from producing syntax, writing boilerplate, memorizing frameworks, implementing repetitive features, or debugging implementation details, then you are competing directly against the thing AI does best.</text:p>
      <text:p text:style-name="P10">And that is not a competition humans win.</text:p>
      <text:p text:style-name="P12"><text:bookmark-end text:name="the-death-of-the-syntax-barrier"/></text:p>
      <text:h text:style-name="P7" text:outline-level="1"><text:bookmark-start text:name="the-great-identity-crisis"/>The Great Identity Crisis</text:h>
      <text:p text:style-name="P8">The software industry is not simply experiencing technological disruption. It is experiencing an identity crisis.</text:p>
      <text:p text:style-name="P9">For decades, engineering excellence was measured through implementation metrics: How much code did you write? How many tickets did you close? How many pull requests did you merge? How many features did you ship?</text:p>
      <text:p text:style-name="P9">These measurements assumed that implementation itself created value. But implementation was never the hard part. Implementation was simply the expensive part.</text:p>
      <text:p text:style-name="P10"/>
      <text:p text:style-name="P10">The truly difficult questions have always been:</text:p>
      <text:list text:style-name="L1">
        <text:list-item>
          <text:p text:style-name="P13">What should we build?</text:p>
        </text:list-item>
        <text:list-item>
          <text:p text:style-name="P13">Why should we build it?</text:p>
        </text:list-item>
        <text:list-item>
          <text:p text:style-name="P13">How do we know it is correct?</text:p>
        </text:list-item>
        <text:list-item>
          <text:p text:style-name="P13">What happens when it fails?</text:p>
        </text:list-item>
        <text:list-item>
          <text:p text:style-name="P13">How will it evolve?</text:p>
        </text:list-item>
        <text:list-item>
          <text:p text:style-name="P13">What future possibilities does it enable or eliminate?</text:p>
        </text:list-item>
      </text:list>
      <text:p text:style-name="P11"/>
      <text:p text:style-name="P14">AI did not create these questions. AI simply removed our ability to ignore them.</text:p>
      <text:p text:style-name="P12"><text:bookmark-end text:name="the-great-identity-crisis"/></text:p>
      <text:p text:style-name="P12"/>
      <text:p text:style-name="P12"/>
      <text:p text:style-name="P12"/>
      <text:p text:style-name="P12"/>
      <text:p text:style-name="P12"/>
      <text:p text:style-name="P12"/>
      <text:p text:style-name="P12"/>
      <text:h text:style-name="P7" text:outline-level="1"><text:bookmark-start text:name="the-rise-of-the-architect-of-intent"/><text:soft-page-break/>The Rise of the Architect of Intent</text:h>
      <text:p text:style-name="P11">As implementation becomes abundant, a new professional identity emerges:</text:p>
      <text:p text:style-name="P6"><text:span text:style-name="T4">The Architect of Intent.</text:span></text:p>
      <text:p text:style-name="P8">The Architect of Intent does not compete with AI. The Architect of Intent <text:span text:style-name="T3">directs</text:span> AI.</text:p>
      <text:p text:style-name="P9">Their value comes from understanding systems, organizations, incentives, constraints, uncertainty, risk, trade-offs, and long-term consequences. Because while AI can generate implementation, it cannot possess organizational judgment.</text:p>
      <text:p text:style-name="P12"><text:bookmark-end text:name="the-rise-of-the-architect-of-intent"/></text:p>
      <text:h text:style-name="P7" text:outline-level="1"><text:bookmark-start text:name="the-context-asymmetry-problem"/>The Context Asymmetry Problem</text:h>
      <text:p text:style-name="P11">This may become the defining challenge of software engineering over the next decade.</text:p>
      <text:p text:style-name="P9">AI systems possess extraordinary implementation capability. They possess almost no future context.</text:p>
      <text:p text:style-name="P9">They optimize for the current prompt, the current objective, the current constraints, and the current environment.</text:p>
      <text:p text:style-name="P9">Human architects optimize for something much larger: organizational strategy, political realities, technical evolution, business adaptation, regulatory change, market dynamics, and future optionality.</text:p>
      <text:p text:style-name="P9">An AI agent can build a system that works perfectly today. A human architect determines whether that same system will prevent the organization from succeeding three years from now.</text:p>
      <text:p text:style-name="P9">This is not an implementation problem. It is a judgment problem. And judgment remains profoundly human.</text:p>
      <text:p text:style-name="P12"><text:bookmark-end text:name="the-context-asymmetry-problem"/></text:p>
      <text:p text:style-name="P12"/>
      <text:p text:style-name="P12"/>
      <text:p text:style-name="P12"/>
      <text:p text:style-name="P12"/>
      <text:p text:style-name="P12"/>
      <text:p text:style-name="P12"/>
      <text:p text:style-name="P12"/>
      <text:p text:style-name="P12"/>
      <text:p text:style-name="P12"/>
      <text:h text:style-name="P7" text:outline-level="1"><text:bookmark-start text:name="the-coming-crisis-verification-debt"/><text:soft-page-break/>The Coming Crisis: Verification Debt</text:h>
      <text:p text:style-name="P11">Ironically, AI’s greatest danger may not be replacement. It may be productivity.</text:p>
      <text:p text:style-name="P10">Organizations everywhere are discovering the same paradox:</text:p>
      <text:p text:style-name="P6">Software generation is becoming cheaper.</text:p>
      <text:p text:style-name="P6">Software understanding is becoming more expensive.</text:p>
      <text:p text:style-name="P11">This creates a new category of organizational risk:</text:p>
      <text:p text:style-name="P6"><text:span text:style-name="T4">Verification Debt.</text:span></text:p>
      <text:p text:style-name="P11">Verification Debt occurs whenever:</text:p>
      <text:p text:style-name="P6"><text:span text:style-name="T4">Our ability to generate software exceeds our ability to understand, validate, and safely evolve it.</text:span></text:p>
      <text:p text:style-name="P8"/>
      <text:p text:style-name="P8">In the industrial era of software, execution represented most of the effort; verification represented a small fraction. In the AI era, execution approaches zero—and verification becomes almost everything.</text:p>
      <text:p text:style-name="P10"/>
      <text:p text:style-name="P10">This changes the economics of engineering itself.</text:p>
      <text:p text:style-name="P9"/>
      <text:p text:style-name="P9">The most valuable person in the room is no longer the person who can generate the most code. The most valuable person is the person who can determine whether the generated system is actually correct.</text:p>
      <text:p text:style-name="P12"><text:bookmark-end text:name="the-coming-crisis-verification-deb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7" text:outline-level="1"><text:bookmark-start text:name="X6dd10e5c96a8384a24c9d782bd9599819d16756"/><text:soft-page-break/>The Field Manual for the Architect of Intent</text:h>
      <text:p text:style-name="P11">If you want to remain valuable, redesign how you spend your time.</text:p>
      <table:table table:name="Table1" table:style-name="Table1">
        <table:table-column table:style-name="Table1.A" table:number-columns-repeated="2"/>
        <table:table-header-rows>
          <table:table-row table:style-name="Table1.1">
            <table:table-cell table:style-name="Table1.A1" office:value-type="string">
              <text:p text:style-name="P15">Factory Floor Engineering</text:p>
            </table:table-cell>
            <table:table-cell table:style-name="Table1.A1" office:value-type="string">
              <text:p text:style-name="P15">Intent-Based Engineering</text:p>
            </table:table-cell>
          </table:table-row>
        </table:table-header-rows>
        <table:table-row table:style-name="Table1.1">
          <table:table-cell table:style-name="Table1.A2" office:value-type="string">
            <text:p text:style-name="P16">Code Review</text:p>
          </table:table-cell>
          <table:table-cell table:style-name="Table1.B2" office:value-type="string">
            <text:p text:style-name="P16">Design Review</text:p>
          </table:table-cell>
        </table:table-row>
        <table:table-row table:style-name="Table1.1">
          <table:table-cell table:style-name="Table1.A3" office:value-type="string">
            <text:p text:style-name="P16">Syntax Optimization</text:p>
          </table:table-cell>
          <table:table-cell table:style-name="Table1.B3" office:value-type="string">
            <text:p text:style-name="P16">Constraint Optimization</text:p>
          </table:table-cell>
        </table:table-row>
        <table:table-row table:style-name="Table1.1">
          <table:table-cell table:style-name="Table1.A4" office:value-type="string">
            <text:p text:style-name="P16">Feature Delivery</text:p>
          </table:table-cell>
          <table:table-cell table:style-name="Table1.B4" office:value-type="string">
            <text:p text:style-name="P16">System Evolution</text:p>
          </table:table-cell>
        </table:table-row>
        <table:table-row table:style-name="Table1.1">
          <table:table-cell table:style-name="Table1.A5" office:value-type="string">
            <text:p text:style-name="P16">Implementation</text:p>
          </table:table-cell>
          <table:table-cell table:style-name="Table1.B5" office:value-type="string">
            <text:p text:style-name="P16">Verification</text:p>
          </table:table-cell>
        </table:table-row>
        <table:table-row table:style-name="Table1.1">
          <table:table-cell table:style-name="Table1.A6" office:value-type="string">
            <text:p text:style-name="P16">Ticket Completion</text:p>
          </table:table-cell>
          <table:table-cell table:style-name="Table1.B6" office:value-type="string">
            <text:p text:style-name="P16">Outcome Validation</text:p>
          </table:table-cell>
        </table:table-row>
        <table:table-row table:style-name="Table1.1">
          <table:table-cell table:style-name="Table1.A7" office:value-type="string">
            <text:p text:style-name="P16">Individual Productivity</text:p>
          </table:table-cell>
          <table:table-cell table:style-name="Table1.B7" office:value-type="string">
            <text:p text:style-name="P16">Organizational Leverage</text:p>
          </table:table-cell>
        </table:table-row>
      </table:table>
      <text:p text:style-name="P10"/>
      <text:p text:style-name="P9">Invest in architectural thinking, systems modeling, verification, observability, domain expertise, organizational understanding, and constraint-based specification.</text:p>
      <text:p text:style-name="P10">Train yourself to ask:</text:p>
      <text:list text:style-name="L2">
        <text:list-item>
          <text:p text:style-name="P17">What happens when this fails?</text:p>
        </text:list-item>
        <text:list-item>
          <text:p text:style-name="P17">What assumptions remain hidden?</text:p>
        </text:list-item>
        <text:list-item>
          <text:p text:style-name="P17">What future options does this eliminate?</text:p>
        </text:list-item>
        <text:list-item>
          <text:p text:style-name="P17">What context is missing?</text:p>
        </text:list-item>
        <text:list-item>
          <text:p text:style-name="P17">What risks have we failed to imagine?</text:p>
        </text:list-item>
      </text:list>
      <text:p text:style-name="P11">These questions increasingly define engineering expertise.</text:p>
      <text:p text:style-name="P12"><text:bookmark-end text:name="X6dd10e5c96a8384a24c9d782bd9599819d16756"/></text:p>
      <text:h text:style-name="P7" text:outline-level="1"><text:bookmark-start text:name="so-is-ai-killing-the-coder"/>So, Is AI Killing the Coder?</text:h>
      <text:p text:style-name="P11">Yes.</text:p>
      <text:p text:style-name="P10">But only a particular kind of coder.</text:p>
      <text:p text:style-name="P9">The engineer whose value is defined primarily by syntax production, boilerplate implementation, framework memorization, and repetitive construction is entering a shrinking market.</text:p>
      <text:p text:style-name="P9">The engineer whose value is defined by judgment, architecture, verification, systems thinking, organizational understanding, and intent orchestration is entering the most important era in the history of software engineering.</text:p>
      <text:p text:style-name="P10">You are not being replaced. You are being asked to evolve.<text:bookmark-end text:name="so-is-ai-killing-the-coder"/></text:p>
      <text:h text:style-name="P7" text:outline-level="1"><text:bookmark-start text:name="the-choice-before-us"/><text:soft-page-break/>The Choice Before Us</text:h>
      <text:p text:style-name="P11">Every technological revolution eventually asks the same question:</text:p>
      <text:p text:style-name="P6"><text:span text:style-name="T4">What part of human expertise remains valuable when the cost of execution approaches zero?</text:span></text:p>
      <text:p text:style-name="P11">For software engineering, that moment has arrived.</text:p>
      <text:p text:style-name="P9">Many of us were trained for an economic reality that no longer exists. We optimized for implementation because implementation was scarce. We measured productivity through code production because code production was expensive.</text:p>
      <text:p text:style-name="P10">Neither assumption remains true.</text:p>
      <text:p text:style-name="P9">The next decade will not belong to the engineers who write the most code. It will belong to the engineers who can define intent, model constraints, anticipate failure, verify correctness, and design systems that can safely evolve.</text:p>
      <text:p text:style-name="P10">The profession is not disappearing. The profession is specializing.</text:p>
      <text:p text:style-name="P9">Some engineers will continue to compete on implementation. Others will move up the stack and become architects of intent.</text:p>
      <text:p text:style-name="P10">The question facing every engineer, engineering manager, and CTO is no longer:</text:p>
      <text:p text:style-name="P6"><text:span text:style-name="T4">“How do we adopt AI?”</text:span></text:p>
      <text:p text:style-name="P11">The real question is:</text:p>
      <text:p text:style-name="P6"><text:span text:style-name="T4">“What does human engineering excellence look like when implementation becomes infrastructure?”</text:span></text:p>
      <text:p text:style-name="P11">My answer is simple:</text:p>
      <text:list text:style-name="L3">
        <text:list-item>
          <text:p text:style-name="P18">Human value moves from execution to judgment.</text:p>
        </text:list-item>
        <text:list-item>
          <text:p text:style-name="P18">From syntax to systems.</text:p>
        </text:list-item>
        <text:list-item>
          <text:p text:style-name="P18">From implementation to verification.</text:p>
        </text:list-item>
        <text:list-item>
          <text:p text:style-name="P18">From coding to architecture.</text:p>
        </text:list-item>
      </text:list>
      <text:p text:style-name="P11"/>
      <text:p text:style-name="P14">The factory floor is closing. The design studio is open.</text:p>
      <text:p text:style-name="P10"/>
      <text:p text:style-name="P10">The only remaining question is:</text:p>
      <text:p text:style-name="P19">Which side of the door will you be standing on?<text:bookmark-end text:name="the-choice-before-u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rial" fo:font-size="12pt" fo:language="en" fo:country="U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class="chapter">
      <style:paragraph-properties fo:margin-top="0.1665in" fo:margin-bottom="0.278in" style:contextual-spacing="false" fo:text-align="center" style:justify-single-word="false"/>
      <style:text-properties fo:color="#1f4e79" loext:opacity="100%" style:font-name="Arial1" fo:font-family="Arial" style:font-family-generic="swiss" style:font-pitch="variable" fo:font-size="24pt" fo:font-weight="bold" style:font-name-asian="Arial2" style:font-family-asian="Arial"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1" style:display-name="Heading 1" style:family="paragraph" style:parent-style-name="Heading" style:default-outline-level="1" style:list-style-name="" style:class="chapter">
      <style:paragraph-properties fo:margin-top="0.2083in" fo:margin-bottom="0.139in" style:contextual-spacing="false"/>
      <style:text-properties fo:color="#1f4e79"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1665in" fo:margin-bottom="0.111in" style:contextual-spacing="false"/>
      <style:text-properties fo:color="#2e75b6"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Subtitle" style:family="paragraph" style:parent-style-name="Heading" style:class="chapter">
      <style:paragraph-properties fo:margin-top="0.1665in" fo:margin-bottom="0.4165in" style:contextual-spacing="false" fo:text-align="center" style:justify-single-word="false"/>
      <style:text-properties style:font-name="Arial1" fo:font-family="Arial" style:font-family-generic="swiss" style:font-pitch="variable" fo:font-size="14pt" fo:font-style="italic" style:font-name-asian="Arial2" style:font-family-asian="Arial" style:font-family-generic-asian="system" style:font-pitch-asian="variable" style:font-size-asian="14pt" style:font-style-asian="italic" style:font-name-complex="Arial2" style:font-family-complex="Arial" style:font-family-generic-complex="system" style:font-pitch-complex="variable" style:font-size-complex="14pt" style:font-style-complex="italic"/>
    </style:style>
    <style:style style:name="Frame_20_contents" style:display-name="Frame contents" style:family="paragraph" style:parent-style-name="Standard" style:class="extra"/>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space" fo:text-indent="-0.1252in" fo:margin-left="0.166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space" fo:text-indent="-0.1252in" fo:margin-left="0.4583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space" fo:text-indent="-0.1252in" fo:margin-left="0.7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space" fo:text-indent="-0.1252in" fo:margin-left="1.0417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space" fo:text-indent="-0.1252in" fo:margin-left="1.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space" fo:text-indent="-0.1252in" fo:margin-left="1.6252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space" fo:text-indent="-0.1252in" fo:margin-left="1.916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space" fo:text-indent="-0.1252in" fo:margin-left="2.2083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space" fo:text-indent="-0.1252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14</meta:editing-cycles>
    <meta:creation-date>2026-07-03T00:28:44.606000000</meta:creation-date>
    <dc:date>2026-07-06T08:59:19.568461800</dc:date>
    <meta:editing-duration>PT27M27S</meta:editing-duration>
    <meta:generator>LibreOffice/26.2.4.2$Windows_X86_64 LibreOffice_project/0229ac93fcf0d7cbc6376066c6f35021cef002dc</meta:generator>
    <meta:document-statistic meta:table-count="1" meta:image-count="0" meta:object-count="0" meta:page-count="8" meta:paragraph-count="135" meta:word-count="1523" meta:character-count="10366" meta:non-whitespace-character-count="8992"/>
  </office:meta>
</office:document-meta>
</file>